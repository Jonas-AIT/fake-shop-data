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e76e0" officeooo:paragraph-rsid="000e76e0" style:font-size-asian="22pt" style:font-size-complex="22pt"/>
    </style:style>
    <style:style style:name="P2" style:family="paragraph" style:parent-style-name="Standard">
      <style:text-properties officeooo:rsid="000e76e0" officeooo:paragraph-rsid="000e76e0"/>
    </style:style>
    <style:style style:name="P3" style:family="paragraph" style:parent-style-name="Standard">
      <style:text-properties fo:font-size="14pt" fo:font-weight="bold" officeooo:rsid="000e76e0" officeooo:paragraph-rsid="000e76e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0e76e0" officeooo:paragraph-rsid="000e76e0" style:font-size-asian="14pt" style:font-size-complex="14pt"/>
    </style:style>
    <style:style style:name="P5" style:family="paragraph" style:parent-style-name="Standard">
      <style:text-properties fo:font-size="14pt" officeooo:rsid="001037f3" officeooo:paragraph-rsid="001037f3" style:font-size-asian="14pt" style:font-size-complex="14pt"/>
    </style:style>
    <style:style style:name="P6" style:family="paragraph" style:parent-style-name="Standard">
      <style:text-properties fo:font-size="14pt" fo:font-weight="bold" officeooo:rsid="001037f3" officeooo:paragraph-rsid="000e76e0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117a6c"/>
    </style:style>
    <style:style style:name="P8" style:family="paragraph" style:parent-style-name="Standard">
      <style:text-properties fo:font-size="14pt" officeooo:rsid="0012b706" officeooo:paragraph-rsid="00117a6c" style:font-size-asian="14pt" style:font-size-complex="14pt"/>
    </style:style>
    <style:style style:name="T1" style:family="text">
      <style:text-properties officeooo:rsid="001037f3"/>
    </style:style>
    <style:style style:name="T2" style:family="text">
      <style:text-properties fo:font-size="14pt" officeooo:rsid="000e76e0" style:font-size-asian="14pt" style:font-size-complex="14pt"/>
    </style:style>
    <style:style style:name="T3" style:family="text">
      <style:text-properties fo:font-size="14pt" officeooo:rsid="00117a6c" style:font-size-asian="14pt" style:font-size-complex="14pt"/>
    </style:style>
    <style:style style:name="T4" style:family="text">
      <style:text-properties fo:font-size="14pt" officeooo:rsid="00154eb0" style:font-size-asian="14pt" style:font-size-complex="14pt"/>
    </style:style>
    <style:style style:name="T5" style:family="text">
      <style:text-properties fo:font-size="14pt" fo:font-weight="bold" officeooo:rsid="00117a6c" style:font-size-asian="14pt" style:font-weight-asian="bold" style:font-size-complex="14pt" style:font-weight-complex="bold"/>
    </style:style>
    <style:style style:name="T6" style:family="text">
      <style:text-properties fo:font-size="14pt" officeooo:rsid="0012b706" style:font-size-asian="14pt" style:font-size-complex="14pt"/>
    </style:style>
    <style:style style:name="T7" style:family="text">
      <style:text-properties officeooo:rsid="00174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herche Statusabfragen-Erweiterung</text:p>
      <text:p text:style-name="P2"/>
      <text:p text:style-name="P3">HTML Parsing &amp; Scraping:</text:p>
      <text:p text:style-name="P4"/>
      <text:p text:style-name="P4"><text:tab/>request + BeautifulSoup4</text:p>
      <text:p text:style-name="P4"><text:tab/><text:tab/>einfaches Scraping, für statische Seiten</text:p>
      <text:p text:style-name="P5"><text:tab/></text:p>
      <text:p text:style-name="P5"><text:tab/>Scrapy<text:line-break/><text:tab/><text:tab/>Multithreading, Retry-Logik, Pipelines, für mehrere 100 Seiten</text:p>
      <text:p text:style-name="P4"><text:tab/><text:line-break/><text:tab/><text:span text:style-name="T1">Playwright<text:line-break/><text:tab/><text:tab/>für Shops, die Inhalte per JavaScript nachladen (viele moderne)</text:span></text:p>
      <text:p text:style-name="P4"/>
      <text:p text:style-name="P6">Extraktion spezifischer Datentypen:</text:p>
      <text:p text:style-name="P4"><text:tab/></text:p>
      <text:p text:style-name="P7"><text:span text:style-name="T2"><text:tab/></text:span><text:span text:style-name="T3">Googles libphonenumber<text:line-break/><text:tab/><text:tab/>Spezialisiert, Telefonnummern aus Rohtext zu erkennen, zu validieren <text:tab/><text:tab/>und in ein einheitliches Format zu bringen<text:line-break/><text:line-break/><text:tab/>E-Mail Extraktion<text:line-break/><text:tab/><text:tab/>über ein Regex Muster mit P</text:span><text:span text:style-name="T4">y</text:span><text:span text:style-name="T3">thon am besten<text:line-break/><text:line-break/><text:tab/>pypostal<text:line-break/><text:tab/><text:tab/>verarbeiten, vereinheitlichen, strukturieren internationaler Adressen</text:span></text:p>
      <text:p text:style-name="P7"><text:span text:style-name="T3"><text:line-break/><text:tab/>python-whois<text:line-break/><text:tab/><text:tab/>für nicht verschlüsselte Betreiberdaten<text:line-break/><text:line-break/></text:span><text:span text:style-name="T5">Vorangehensweise</text:span><text:span text:style-name="T3"><text:line-break/><text:tab/><text:line-break/><text:tab/>Impressum<text:line-break/><text:tab/><text:tab/>Erst die Impressum Seite suchen, dann dort dirkt parsen<text:line-break/><text:tab/><text:tab/><text:line-break/><text:tab/></text:span><text:span text:style-name="T6">JSON<text:line-break/><text:tab/><text:tab/>Strukturierte Daten erst über JSON parsen</text:span></text:p>
      <text:p text:style-name="P8"><text:line-break/><text:tab/><text:span text:style-name="T7">WARC<text:line-break/><text:tab/><text:tab/>Web archive Container Format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4T15:23:40.689810681</meta:creation-date>
    <dc:date>2026-07-15T16:28:12.902410206</dc:date>
    <meta:editing-duration>PT6H1M20S</meta:editing-duration>
    <meta:editing-cycles>6</meta:editing-cycles>
    <meta:generator>LibreOffice/26.2.4.2$Linux_X86_64 LibreOffice_project/3346a99e6b841765b75a9b29714a5b95c6761ce3</meta:generator>
    <meta:document-statistic meta:table-count="0" meta:image-count="0" meta:object-count="0" meta:page-count="1" meta:paragraph-count="12" meta:word-count="96" meta:character-count="838" meta:non-whitespace-character-count="705"/>
  </office:meta>
</office:document-meta>
</file>